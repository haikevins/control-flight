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1f499f"/>
    </style:style>
    <style:style style:name="T2" style:family="text">
      <style:text-properties officeooo:rsid="00207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:A7:04:BB:6D:64 // controll</text:p>
      <text:p text:style-name="P1">EC:DA:3B:BF:7B:C4 // dr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3T20:06:10.351255371</meta:creation-date>
    <dc:date>2026-06-13T21:19:41.473091788</dc:date>
    <meta:editing-duration>PT1H13M3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6" meta:character-count="55" meta:non-whitespace-character-count="51"/>
  </office:meta>
</office:document-meta>
</file>